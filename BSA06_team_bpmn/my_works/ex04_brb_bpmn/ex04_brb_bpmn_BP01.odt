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A668138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1591in" svg:y="2.522in" svg:width="6.2673in" svg:height="4.1736in" draw:z-index="0"><draw:image xlink:href="Pictures/100000000000056300000398A66813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23:41</meta:creation-date>
    <meta:document-statistic meta:table-count="0" meta:image-count="1" meta:object-count="0" meta:page-count="1" meta:paragraph-count="0" meta:word-count="0" meta:character-count="0"/>
    <dc:date>2026-04-20T18:29:08</dc:date>
    <dc:creator>Виктория Люст </dc:creator>
    <meta:editing-duration>PT5M28S</meta:editing-duration>
    <meta:editing-cycles>1</meta:editing-cycles>
    <meta:generator>OpenOffice/4.1.14$Unix OpenOffice.org_project/4114m1$Build-9811</meta:generator>
  </office:meta>
</office:document-meta>
</file>